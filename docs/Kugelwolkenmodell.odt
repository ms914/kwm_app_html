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0d43f2" officeooo:paragraph-rsid="000d43f2"/>
    </style:style>
    <style:style style:name="P2" style:family="paragraph" style:parent-style-name="Table_20_Contents">
      <style:text-properties officeooo:rsid="000f96f6" officeooo:paragraph-rsid="000f96f6"/>
    </style:style>
    <style:style style:name="P3" style:family="paragraph" style:parent-style-name="Table_20_Contents">
      <style:text-properties officeooo:rsid="000fc4d4" officeooo:paragraph-rsid="000fc4d4"/>
    </style:style>
    <style:style style:name="P4" style:family="paragraph" style:parent-style-name="Table_20_Contents">
      <style:text-properties officeooo:rsid="0011525a" officeooo:paragraph-rsid="0011525a"/>
    </style:style>
    <style:style style:name="P5"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12043d" officeooo:paragraph-rsid="0012043d"/>
    </style:style>
    <style:style style:name="P6"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13e654" officeooo:paragraph-rsid="0013e654"/>
    </style:style>
    <style:style style:name="P7"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145d6d" officeooo:paragraph-rsid="00145d6d"/>
    </style:style>
    <style:style style:name="P8"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0d43f2" officeooo:paragraph-rsid="0012043d"/>
    </style:style>
    <style:style style:name="P9"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0fc4d4" officeooo:paragraph-rsid="000fc4d4"/>
    </style:style>
    <style:style style:name="P10"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05d719" officeooo:paragraph-rsid="0005d719"/>
    </style:style>
    <style:style style:name="P11"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06c65c" officeooo:paragraph-rsid="0006c65c"/>
    </style:style>
    <style:style style:name="P12"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074cd5" officeooo:paragraph-rsid="00074cd5"/>
    </style:style>
    <style:style style:name="P13"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style:style>
    <style:style style:name="P14" style:family="paragraph" style:parent-style-name="Standard">
      <style:paragraph-properties fo:text-indent="0cm" style:auto-text-indent="false"/>
    </style:style>
    <style:style style:name="P15" style:family="paragraph" style:parent-style-name="Standard">
      <style:paragraph-properties fo:margin-top="0cm" fo:margin-bottom="0.499cm" style:contextual-spacing="false" fo:text-indent="0cm" style:auto-text-indent="false"/>
      <style:text-properties fo:font-variant="normal" fo:text-transform="none" fo:letter-spacing="normal" fo:font-style="normal" fo:font-weight="normal"/>
    </style:style>
    <style:style style:name="P16" style:family="paragraph" style:parent-style-name="Standard">
      <style:paragraph-properties fo:margin-left="0cm" fo:margin-right="0cm" fo:text-indent="0cm" style:auto-text-indent="false"/>
      <style:text-properties fo:font-variant="normal" fo:text-transform="none" fo:color="#036a07" loext:opacity="100%" fo:letter-spacing="normal" fo:font-style="normal" fo:font-weight="normal" officeooo:rsid="0009029c" officeooo:paragraph-rsid="0009029c"/>
    </style:style>
    <style:style style:name="P17" style:family="paragraph" style:parent-style-name="Standard">
      <style:paragraph-properties fo:margin-left="0cm" fo:margin-right="0cm" fo:margin-top="0cm" fo:margin-bottom="0.499cm" style:contextual-spacing="false" fo:text-indent="0cm" style:auto-text-indent="false"/>
      <style:text-properties fo:font-variant="normal" fo:text-transform="none" fo:color="#036a07" loext:opacity="100%" fo:letter-spacing="normal" fo:font-style="normal" fo:font-weight="normal" officeooo:rsid="0009029c" officeooo:paragraph-rsid="0009029c"/>
    </style:style>
    <style:style style:name="P18" style:family="paragraph" style:parent-style-name="Text_20_body">
      <style:text-properties officeooo:rsid="0009029c" officeooo:paragraph-rsid="0009029c"/>
    </style:style>
    <style:style style:name="P19" style:family="paragraph" style:parent-style-name="Preformatted_20_Text">
      <style:paragraph-properties fo:margin-top="0cm" fo:margin-bottom="0.499cm" style:contextual-spacing="false"/>
    </style:style>
    <style:style style:name="P20" style:family="paragraph" style:parent-style-name="Standard">
      <style:paragraph-properties fo:text-indent="0cm" style:auto-text-indent="false"/>
      <style:text-properties fo:font-variant="normal" fo:text-transform="none" fo:letter-spacing="normal" fo:font-style="normal" fo:font-weight="normal"/>
    </style:style>
    <style:style style:name="P21" style:family="paragraph" style:parent-style-name="Standard">
      <style:paragraph-properties fo:margin-top="0cm" fo:margin-bottom="0.499cm" style:contextual-spacing="false"/>
    </style:style>
    <style:style style:name="P22" style:family="paragraph" style:parent-style-name="Standard">
      <style:paragraph-properties fo:margin-top="0cm" fo:margin-bottom="0.499cm" style:contextual-spacing="false"/>
      <style:text-properties officeooo:rsid="00093fda" officeooo:paragraph-rsid="00093fda"/>
    </style:style>
    <style:style style:name="P23" style:family="paragraph" style:parent-style-name="Standard">
      <style:paragraph-properties fo:margin-top="0cm" fo:margin-bottom="0.499cm" style:contextual-spacing="false"/>
      <style:text-properties officeooo:rsid="00098cd8" officeooo:paragraph-rsid="00098cd8"/>
    </style:style>
    <style:style style:name="P24" style:family="paragraph" style:parent-style-name="Text_20_body">
      <style:text-properties officeooo:paragraph-rsid="00093fda"/>
    </style:style>
    <style:style style:name="P25" style:family="paragraph" style:parent-style-name="Preformatted_20_Text">
      <style:paragraph-properties fo:margin-top="0cm" fo:margin-bottom="0.499cm" style:contextual-spacing="false"/>
      <style:text-properties officeooo:rsid="0009d1f4" officeooo:paragraph-rsid="0009d1f4"/>
    </style:style>
    <style:style style:name="T1" style:family="text">
      <style:text-properties officeooo:rsid="000e191d"/>
    </style:style>
    <style:style style:name="T2" style:family="text">
      <style:text-properties officeooo:rsid="000fc4d4"/>
    </style:style>
    <style:style style:name="T3" style:family="text">
      <style:text-properties officeooo:rsid="0011525a"/>
    </style:style>
    <style:style style:name="T4" style:family="text">
      <style:text-properties officeooo:rsid="0009029c"/>
    </style:style>
    <style:style style:name="T5" style:family="text">
      <style:text-properties officeooo:rsid="00098c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ugelwolkenmodell</text:p>
      <text:p text:style-name="P1">Das Kugelwolkenmodell ist <text:span text:style-name="T1">ein für die Sekundarstufe I im deutschsprachigen Raum verwendetes pädagogisches Werkzeug (U Rostok, Andre Reinicke, 2015, OpenGL, C++). Es fehlt ein über das Internet als WebApp zugängliches Werkzeug für ipads. Das pädagogische Ziel des Kugelwolkenmodells ist die frühzeitige Hinführung zum Bindungsverhalten der 1. Periode für die chemische Bindung als Basis für organische und Polymerchemie.</text:span></text:p>
      <text:p text:style-name="P1"/>
      <table:table table:name="Table1" table:style-name="Table1">
        <table:table-column table:style-name="Table1.A" table:number-columns-repeated="5"/>
        <table:table-row>
          <table:table-cell table:style-name="Table1.A1" office:value-type="string">
            <text:p text:style-name="P2">Version</text:p>
          </table:table-cell>
          <table:table-cell table:style-name="Table1.A1" office:value-type="string">
            <text:p text:style-name="P2">Architektur</text:p>
          </table:table-cell>
          <table:table-cell table:style-name="Table1.A1" office:value-type="string">
            <text:p text:style-name="P2">LLM</text:p>
          </table:table-cell>
          <table:table-cell table:style-name="Table1.A1" office:value-type="string">
            <text:p text:style-name="P2">Problem</text:p>
          </table:table-cell>
          <table:table-cell table:style-name="Table1.E1" office:value-type="string">
            <text:p text:style-name="P3">Publish</text:p>
          </table:table-cell>
        </table:table-row>
        <table:table-row>
          <table:table-cell table:style-name="Table1.A2" office:value-type="string">
            <text:p text:style-name="P2">1.0</text:p>
          </table:table-cell>
          <table:table-cell table:style-name="Table1.A2" office:value-type="string">
            <text:p text:style-name="P2">Web app <text:span text:style-name="T2">mit WebGL three.js</text:span></text:p>
          </table:table-cell>
          <table:table-cell table:style-name="Table1.A2" office:value-type="string">
            <text:p text:style-name="P2">claude</text:p>
          </table:table-cell>
          <table:table-cell table:style-name="Table1.A2" office:value-type="string">
            <text:p text:style-name="P2">Kontextfenster zu klein</text:p>
          </table:table-cell>
          <table:table-cell table:style-name="Table1.E2" office:value-type="string">
            <text:p text:style-name="P3">Claude, github pages</text:p>
          </table:table-cell>
        </table:table-row>
        <table:table-row>
          <table:table-cell table:style-name="Table1.A2" office:value-type="string">
            <text:p text:style-name="P2">2.0</text:p>
          </table:table-cell>
          <table:table-cell table:style-name="Table1.A2" office:value-type="string">
            <text:p text:style-name="P2">Module (main.js, atom.js, bond.js, scene.js)</text:p>
          </table:table-cell>
          <table:table-cell table:style-name="Table1.A2" office:value-type="string">
            <text:p text:style-name="P2">deepseek</text:p>
          </table:table-cell>
          <table:table-cell table:style-name="Table1.A2" office:value-type="string">
            <text:p text:style-name="P2">Interfaces, Architektur</text:p>
          </table:table-cell>
          <table:table-cell table:style-name="Table1.E2" office:value-type="string">
            <text:p text:style-name="Table_20_Contents"/>
          </table:table-cell>
        </table:table-row>
        <table:table-row>
          <table:table-cell table:style-name="Table1.A2" office:value-type="string">
            <text:p text:style-name="P2">3.0</text:p>
          </table:table-cell>
          <table:table-cell table:style-name="Table1.A2" office:value-type="string">
            <text:p text:style-name="P2">Client-Server (python colab, ngrok, backend python, frontend js, <text:span text:style-name="T2">json</text:span>)</text:p>
          </table:table-cell>
          <table:table-cell table:style-name="Table1.A2" office:value-type="string">
            <text:p text:style-name="P2">gemini</text:p>
          </table:table-cell>
          <table:table-cell table:style-name="Table1.A2" office:value-type="string">
            <text:p text:style-name="P3">Ngrok limit, Server Adresse wechselt zu oft beim debuggen</text:p>
          </table:table-cell>
          <table:table-cell table:style-name="Table1.E2" office:value-type="string">
            <text:p text:style-name="P3">Github pages</text:p>
          </table:table-cell>
        </table:table-row>
        <table:table-row>
          <table:table-cell table:style-name="Table1.A2" office:value-type="string">
            <text:p text:style-name="P3">4.0</text:p>
          </table:table-cell>
          <table:table-cell table:style-name="Table1.A2" office:value-type="string">
            <text:p text:style-name="P3">Client-Server lokal auf colab server, python + python, py3dmol</text:p>
          </table:table-cell>
          <table:table-cell table:style-name="Table1.A2" office:value-type="string">
            <text:p text:style-name="P3">gemini</text:p>
          </table:table-cell>
          <table:table-cell table:style-name="Table1.A2" office:value-type="string">
            <text:p text:style-name="P3">Kein three.js für webinterface, keine Maussteuerung für snap in</text:p>
          </table:table-cell>
          <table:table-cell table:style-name="Table1.E2" office:value-type="string">
            <text:p text:style-name="P3">colab</text:p>
          </table:table-cell>
        </table:table-row>
        <table:table-row>
          <table:table-cell table:style-name="Table1.A2" office:value-type="string">
            <text:p text:style-name="P3">5.0</text:p>
          </table:table-cell>
          <table:table-cell table:style-name="Table1.A2" office:value-type="string">
            <text:p text:style-name="P3">CLI, smiles, mol</text:p>
          </table:table-cell>
          <table:table-cell table:style-name="Table1.A2" office:value-type="string">
            <text:p text:style-name="P3">gemini</text:p>
          </table:table-cell>
          <table:table-cell table:style-name="Table1.A2" office:value-type="string">
            <text:p text:style-name="P3">Maussteuerung</text:p>
          </table:table-cell>
          <table:table-cell table:style-name="Table1.E2" office:value-type="string">
            <text:p text:style-name="Table_20_Contents"/>
          </table:table-cell>
        </table:table-row>
        <table:table-row>
          <table:table-cell table:style-name="Table1.A2" office:value-type="string">
            <text:p text:style-name="P4">6.0</text:p>
          </table:table-cell>
          <table:table-cell table:style-name="Table1.A2" office:value-type="string">
            <text:p text:style-name="P4">Pseudocode (BE, CLI, Sce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7.0</text:p>
          </table:table-cell>
          <table:table-cell table:style-name="Table1.A2" office:value-type="string">
            <text:p text:style-name="P4">Smiles plugin, colab</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1"/>
      <text:p text:style-name="P5">Koordinatensystem: Atome haben Weltkoordinaten, Wolken haben lokale Koordinaten um ein Atom herum.</text:p>
      <text:p text:style-name="P1"/>
      <text:p text:style-name="P5">Geometrie: Das Kugelwolkenmodell reduziert Atomorbitale der Valenzelektronen auf einfache simplices: Sphärisch, Linear, Trigonal-planar, tetrahedral. Das wird in numpy arrays abgebildet. [-s, s, s], [s, -s, -s], [-s, s, -s], [-s, -s, s]</text:p>
      <text:p text:style-name="P5"/>
      <text:p text:style-name="P5">Valenzelektronen: Wir haben in der 1. Periode Z-2 Valenzelektronen. Die Valenzelektronen werden nach der Hundschen Regel auf die Wolken verteilt, so dass man eine Liste der Elektronenbesetzung zu jedem Element aufbaut. z. B. Sauerstoff hat [2,2,1,1].</text:p>
      <text:p text:style-name="P5"/>
      <text:p text:style-name="P6">Damit baut man Atom-Objekte. In einer Scene befinden sich mehrere Atomobjekte. Diese können gebunden oder ungebunden sein.</text:p>
      <text:p text:style-name="P5"/>
      <text:p text:style-name="P6">Bindung: Die Bindung ist ein grundlegendes chemisches Konzept. Die Bindung ist eine durch Elektronenwechselwirkung (Pauli-Prinzip) erzeugte attraktive Kraft zwischen Atomen. Freie Elektronenpaare dagegen wirken wie elektrische negative abstossende Ladungen. Die <text:soft-page-break/>Bindungsrichtung hängt von der Molekülorbitaltheorie ab. Eine geometrische Näherung sind die Kugelwolken.</text:p>
      <text:p text:style-name="P6"/>
      <text:p text:style-name="P6">Mehrfachbindungen: Die Existenz von sigma und pi Orbitalen sorgt für eine sigma Bindung und eine pi Bindung. Das erzeugt trigonal planare Strukturen für ungebundene Elektronenwolken.</text:p>
      <text:p text:style-name="P6"/>
      <text:p text:style-name="P7">Bindungslogik: Ausgehend von der Bindungsordnung (Hybridisierung, sp, sp^2, sp^3) orientiert man Atom B zu Atom A. Die Wolken von A legen fest, wo die Wolken von B liegen müssen. Daraus ermittelt man dann die Atomposition von B (global) und die Wolken von B (lokal: Rotation um 180° notwendig?, global).</text:p>
      <text:p text:style-name="P7"/>
      <text:p text:style-name="P7">Weitere Bindungslogiken: Prokrustes, Bindungsachse, Bindungsbananen</text:p>
      <text:p text:style-name="P6"/>
      <text:p text:style-name="P6">Typische Verbindungen: Wasser (O), Methan (C), Ethen (C=C), Ethin (C#C), </text:p>
      <text:p text:style-name="P1"/>
      <text:p text:style-name="P8"/>
      <text:p text:style-name="P9">Algorithmus: Prokrustes, Kabsch, SVD</text:p>
      <text:p text:style-name="P9">Geometrie: Vektor, GA</text:p>
      <text:p text:style-name="P9">Stack: 3Dmol (js, py, st), three.js, openBabel (Avogadro), ngx, R3F, <text:span text:style-name="T3">React(jsx), </text:span>Svente, rdkit, scipy, <text:span text:style-name="T3">html/jsx</text:span> </text:p>
      <text:p text:style-name="P10"/>
      <text:p text:style-name="P10"/>
      <text:p text:style-name="P10">Bindungslogik:</text:p>
      <text:p text:style-name="P10"/>
      <text:p text:style-name="P10">1. Check ob ID’s im Weltzustand vorhanden sind</text:p>
      <text:p text:style-name="P10">2. jetzt kann man die beiden beteiligten Atome aus dem Weltzustand laden</text:p>
      <text:p text:style-name="P10">3. überprüfen, ob es gemeinsame Wolken gibt</text:p>
      <text:p text:style-name="P10">4. Check ob bereits gebunden</text:p>
      <text:p text:style-name="P11">5. Check ob bereits 3x gebunden</text:p>
      <text:p text:style-name="P11">6. ordne bindende Wolken vor nichtbindende</text:p>
      <text:p text:style-name="P11">7. Check ob noch freie da sind</text:p>
      <text:p text:style-name="P11">8. ermittle Bindungsabstand</text:p>
      <text:p text:style-name="P11">9. finde Bindungsachse (hier ist das die erste bindende Wolke), normiert (d.h. Richtung)</text:p>
      <text:p text:style-name="P11">10. Berechne neue Position für B entlang der Bindungsachse plus Bindungsabstand</text:p>
      <text:p text:style-name="P11">11. Jetzt Drehung finden: zielAchseB ist negative Bindungsachse (d.h. entgegengesetzt zu A); startAchseB ist die erste freie bindende Wolke von B (d.h. auf der Achse ist hinterher eine Wolke)</text:p>
      <text:p text:style-name="P12">12. Nur bei 3 fach Bindung: Nochmal auf der Achse um 60° drehen</text:p>
      <text:p text:style-name="P12">13. Diesen CGA Vektor dann B zuordnen (damit ist B gedreht)</text:p>
      <text:p text:style-name="P12">14. Die erste Bindungswolke als gebunden markieren</text:p>
      <text:p text:style-name="P12"/>
      <text:p text:style-name="P12">Ganz offensichtlich kann dieses /bind keine Doppelbindungen und Dreifachbindungen behandeln. Dort muss man nämlich zuerst aus dem cli die Ordnung der Bindung abfragen, um dann im Fall einer Doppelbindung aus den beiden ersten Bindungswolken-Vektoren eine mittlere Richtung für die Achse zu ermitteln und die Achsen der übrig gebliebenen Wolken kollinear und machen (senkrecht zur Doppelbindung sollten sie sein)</text:p>
      <text:p text:style-name="P12"/>
      <text:h text:style-name="Heading_20_1" text:outline-level="1">Server</text:h>
      <text:p text:style-name="P13"/>
      <text:p text:style-name="P13">@app.post("/binde")</text:p>
      <text:p text:style-name="P13">def binde(daten: dict):</text:p>
      <text:p text:style-name="P13"><text:soft-page-break/>if daten["atom_A_id"] not in WELT_ZUSTAND or daten["atom_B_id"] not in WELT_ZUSTAND:</text:p>
      <text:p text:style-name="P13">return {"status": "error", "message": "Eines der Atome existiert nicht. ID prüfen!"}</text:p>
      <text:p text:style-name="P14"/>
      <text:p text:style-name="P13">atom_A = WELT_ZUSTAND[daten["atom_A_id"]]</text:p>
      <text:p text:style-name="P13">atom_B = WELT_ZUSTAND[daten["atom_B_id"]]</text:p>
      <text:p text:style-name="P14"/>
      <text:p text:style-name="P13">for w in atom_A["wolken"]:</text:p>
      <text:p text:style-name="P13">if "partner" not in w: w["partner"] = None</text:p>
      <text:p text:style-name="P13">for w in atom_B["wolken"]:</text:p>
      <text:p text:style-name="P13">if "partner" not in w: w["partner"] = None</text:p>
      <text:p text:style-name="P14"/>
      <text:p text:style-name="P13">bereits_gebunden = sum(1 for w in atom_A["wolken"] if w["partner"] == daten["atom_B_id"])</text:p>
      <text:p text:style-name="P13">ziel_ordnung = bereits_gebunden + 1</text:p>
      <text:p text:style-name="P14"/>
      <text:p text:style-name="P13">if ziel_ordnung &gt; 3:</text:p>
      <text:p text:style-name="P13">return {"status": "error", "message": "Maximale Bindungsordnung erreicht."}</text:p>
      <text:p text:style-name="P14"/>
      <text:p text:style-name="P13"># Alte Sortierung nimmt auch existierende nicht bindende Wolken mit 2 Elektronen an</text:p>
      <text:p text:style-name="P13"># freie_A = [w for w in atom_A["wolken"] if w["elektronen"] &lt; 3]</text:p>
      <text:p text:style-name="P13"># freie_B = [w for w in atom_B["wolken"] if w["elektronen"] &lt; 3]</text:p>
      <text:p text:style-name="P14"/>
      <text:p text:style-name="P13"># Sortiere so, dass Wolken mit 1 Elektron (Radikale) VOR Wolken mit 2 Elektronen (Paare) kommen</text:p>
      <text:p text:style-name="P13">freie_A = sorted([w for w in atom_A["wolken"] if w["elektronen"] &lt; 3], key=lambda x: x["elektronen"])</text:p>
      <text:p text:style-name="P13">freie_B = sorted([w for w in atom_B["wolken"] if w["elektronen"] &lt; 3], key=lambda x: x["elektronen"])</text:p>
      <text:p text:style-name="P14"/>
      <text:p text:style-name="P13">if not freie_A or not freie_B:</text:p>
      <text:p text:style-name="P13">return {"status": "error", "message": "Keine freien Wolken verfügbar."}</text:p>
      <text:p text:style-name="P14"/>
      <text:p text:style-name="P13"># Nutze spezifischen C-H Bindungsabstand aus dem Profil</text:p>
      <text:p text:style-name="P14"/>
      <text:p text:style-name="P13">if "O" in [atom_A["symbol"], atom_B["symbol"]]:</text:p>
      <text:p text:style-name="P13">abstand = ELEMENT_PROFIL["O"]["abstand"]</text:p>
      <text:p text:style-name="P13">else:</text:p>
      <text:p text:style-name="P13">abstand = ELEMENT_PROFIL["H"]["abstand"] if (atom_A["symbol"] == "H" or atom_B["symbol"] == "H") else ELEMENT_PROFIL["C"]["abstand"]</text:p>
      <text:p text:style-name="P15"><text:line-break/><text:line-break/></text:p>
      <text:p text:style-name="P13"># 3. GEOMETRISCHE ACHSE (Translation - Jetzt voll dynamisch)</text:p>
      <text:p text:style-name="P13">lokaler_vektor_A = np.array(freie_A[0]["lokal"])</text:p>
      <text:p text:style-name="P13">if np.linalg.norm(lokaler_vektor_A) == 0:</text:p>
      <text:p text:style-name="P13">achse_A = np.array([1.0, 0.0, 0.0])</text:p>
      <text:p text:style-name="P13">else:</text:p>
      <text:p text:style-name="P13">achse_A = lokaler_vektor_A / np.linalg.norm(lokaler_vektor_A)</text:p>
      <text:p text:style-name="P14"/>
      <text:p text:style-name="P13">neue_pos_B = np.array(atom_A["position"]) + (achse_A * abstand)</text:p>
      <text:p text:style-name="P13">atom_B["position"] = neue_pos_B.tolist()</text:p>
      <text:p text:style-name="P14"/>
      <text:p text:style-name="P13"><text:soft-page-break/># 4. CGA ROTOR-KASKADE (Hier war der Bug-Fix!)</text:p>
      <text:p text:style-name="P13">ziel_achse_B = -achse_A</text:p>
      <text:p text:style-name="P13">start_achse_B = np.array(freie_B[0]["lokal"])</text:p>
      <text:p text:style-name="P13">if np.linalg.norm(start_achse_B) == 0:</text:p>
      <text:p text:style-name="P13">start_achse_B = np.array([1.0, 0.0, 0.0])</text:p>
      <text:p text:style-name="P13">start_achse_B = start_achse_B / np.linalg.norm(start_achse_B)</text:p>
      <text:p text:style-name="P14"/>
      <text:p text:style-name="P13"># JETZT REPARIERT: start_achse_B wird korrekt übergeben</text:p>
      <text:p text:style-name="P13">R_final = berechne_richtungs_rotor(start_achse_B, ziel_achse_B)</text:p>
      <text:p text:style-name="P14"/>
      <text:p text:style-name="P13">if ziel_ordnung == 2:</text:p>
      <text:p text:style-name="P13">R_torsion = berechne_axialen_rotor(achse_A, np.radians(0))</text:p>
      <text:p text:style-name="P13">R_final = R_torsion * R_final</text:p>
      <text:p text:style-name="P13">elif ziel_ordnung == 3:</text:p>
      <text:p text:style-name="P13">R_torsion = berechne_axialen_rotor(achse_A, np.radians(60))</text:p>
      <text:p text:style-name="P13">R_final = R_torsion * R_final</text:p>
      <text:p text:style-name="P14"/>
      <text:p text:style-name="P13">atom_B["rotor_bivektor"] = [float(R_final[e1*e2]), float(R_final[e2*e3]), float(R_final[e3*e1])]</text:p>
      <text:p text:style-name="P14"/>
      <text:p text:style-name="P13"># 5. STATUS UPDATEN</text:p>
      <text:p text:style-name="P13">freie_A[0]["elektronen"] = 3</text:p>
      <text:p text:style-name="P13">freie_A[0]["partner"] = daten["atom_B_id"]</text:p>
      <text:p text:style-name="P13">freie_B[0]["elektronen"] = 3</text:p>
      <text:p text:style-name="P13">freie_B[0]["partner"] = daten["atom_A_id"]</text:p>
      <text:p text:style-name="P14"/>
      <text:p text:style-name="P13">return {"status": "success", "bindung_aktuell": ziel_ordnung}</text:p>
      <text:p text:style-name="P13"/>
      <text:p text:style-name="P13"/>
      <text:p text:style-name="P16">=======================================================================</text:p>
      <text:p text:style-name="P17"/>
      <text:h text:style-name="Heading_20_1" text:outline-level="1">3. GEOMETRISCHE ACHSE (Mittelwert aller beteiligten Wolken)</text:h>
      <text:p text:style-name="P18">1. Gebundene und freie Wolken finden von A</text:p>
      <text:p text:style-name="P18">2. Bindungsachse = Vektorsumme dieser</text:p>
      <text:p text:style-name="P18">3. B auf dieser Achse anordnen</text:p>
      <text:p text:style-name="P18">4. achse_B = -achse_A</text:p>
      <text:p text:style-name="P18">5. auch B Vektorsumme</text:p>
      <text:p text:style-name="P18">6. weiter bei Rotation</text:p>
      <text:p text:style-name="Text_20_body"/>
      <text:p text:style-name="P19"># Finde alle Wolken von A, die an B gebunden sind ODER die aktuelle freie Wolke sind<text:line-break/>beteiligte_wolken_A = [w for w in atom_A["wolken"] if w["partner"] == daten["atom_B_id"]]<text:line-break/><text:line-break/># Die neue freie Wolke, die jetzt binden soll, kommt hinzu<text:line-break/>beteiligte_wolken_A.append(freie_A[0])<text:line-break/><text:soft-page-break/><text:line-break/># Vektorsumme über alle beteiligten lokalen Wolkenvektoren bilden<text:line-break/>lokaler_vektor_A = np.sum([np.array(w["lokal"]) for w in beteiligte_wolken_A], axis=0)<text:line-break/><text:line-break/>norm_A = np.linalg.norm(lokaler_vektor_A)<text:line-break/>if norm_A == 0:<text:line-break/> <text:s text:c="3"/>achse_A = np.array([1.0, 0.0, 0.0])<text:line-break/>else:<text:line-break/> <text:s text:c="3"/>achse_A = lokaler_vektor_A / norm_A<text:line-break/><text:line-break/># Positionierung von Atom B entlang dieser gemittelten Achse<text:line-break/>neue_pos_B = np.array(atom_A["position"]) + (achse_A * abstand)<text:line-break/>atom_B["position"] = neue_pos_B.tolist()<text:line-break/><text:line-break/># 4. CGA ROTOR-KASKADE (Gleiches Prinzip für Atom B)<text:line-break/>ziel_achse_B = -achse_A<text:line-break/><text:line-break/># Auch bei B den Mittelwert der beteiligten Wolken für die Startachse nutzen<text:line-break/>beteiligte_wolken_B = [w for w in atom_B["wolken"] if w["partner"] == daten["atom_A_id"]]<text:line-break/>beteiligte_wolken_B.append(freie_B[0])<text:line-break/><text:line-break/>start_vektor_B = np.sum([np.array(w["lokal"]) for w in beteiligte_wolken_B], axis=0)<text:line-break/><text:line-break/>norm_B = np.linalg.norm(start_vektor_B)<text:line-break/>if norm_B == 0:<text:line-break/> <text:s text:c="3"/>start_achse_B = np.array([1.0, 0.0, 0.0])<text:line-break/>else:<text:line-break/> <text:s text:c="3"/>start_achse_B = start_vektor_B / norm_B</text:p>
      <text:p text:style-name="Text_20_body"/>
      <text:p text:style-name="P20"/>
      <text:p text:style-name="Standard"><text:line-break/><text:span text:style-name="T4">======================================================================</text:span></text:p>
      <text:p text:style-name="P21"/>
      <text:p text:style-name="P22">1. Bindungsordnung ermitteln; Bindung erstellen heist: Bindungsordnung erhöhen, aber nicht über </text:p>
      <text:p text:style-name="P22"><text:span text:style-name="T5">2</text:span>. Freie Wolken suchen (wie vor sortiert)</text:p>
      <text:p text:style-name="P23">3. Abstandsbestimmung je nach Zustand (kann man auch festsetzen</text:p>
      <text:p text:style-name="P23">4. Bindungsachse bestimmen aus Mittelwert (wie vor)</text:p>
      <text:p text:style-name="P23">5. Rotoren (wie vor)</text:p>
      <text:p text:style-name="P23">6. Weltzustand updaten (wie vor)</text:p>
      <text:p text:style-name="P21"/>
      <text:p text:style-name="P21"/>
      <text:p text:style-name="Text_20_body">import numpy as np from fastapi import APIRouter, HTTPException</text:p>
      <text:p text:style-name="Text_20_body">router = APIRouter()</text:p>
      <text:h text:style-name="Heading_20_1" text:outline-level="1"><text:soft-page-break/>Globale Dictionaries (müssen in deinem Hauptskript definiert sein)</text:h>
      <text:h text:style-name="Heading_20_1" text:outline-level="1">WELT_ZUSTAND = { ... }</text:h>
      <text:h text:style-name="Heading_20_1" text:outline-level="1">ELEMENT_PROFIL = { ... }</text:h>
      <text:h text:style-name="Heading_20_1" text:outline-level="1">BINDUNGS_MATRIX = { ... } (Optional für präzise Abstände)</text:h>
      <text:p text:style-name="P24">@router.post("/binde") </text:p>
      <text:p text:style-name="P24">def binde(daten: dict): # ========================================== </text:p>
      <text:p text:style-name="P24"># 1. VALIDIERUNG &amp; EXISTENZPRÜFUNG </text:p>
      <text:p text:style-name="P24"># ========================================== </text:p>
      <text:p text:style-name="P24">if daten["atom_A_id"] not in WELT_ZUSTAND or daten["atom_B_id"] not in WELT_ZUSTAND: return {"status": "error", "message": "Eines der Atome existiert nicht. ID prüfen!"}</text:p>
      <text:p text:style-name="P19">atom_A = WELT_ZUSTAND[daten["atom_A_id"]]<text:line-break/>atom_B = WELT_ZUSTAND[daten["atom_B_id"]]<text:line-break/><text:line-break/># Sicherstellen, dass das 'partner'-Feld überall existiert<text:line-break/>for w in atom_A["wolken"]: <text:line-break/> w.setdefault("partner", None)<text:line-break/>for w in atom_B["wolken"]: <text:line-break/> w.setdefault("partner", None)<text:line-break/><text:line-break/># Aktuelle Bindungsordnung ermitteln<text:line-break/>bereits_gebunden_A = [w for w in atom_A["wolken"] if w["partner"] == daten["atom_B_id"]]<text:line-break/>bereits_gebunden_B = [w for w in atom_B["wolken"] if w["partner"] == daten["atom_A_id"]]<text:line-break/><text:line-break/>ziel_ordnung = len(bereits_gebunden_A) + 1<text:line-break/><text:line-break/>if ziel_ordnung &gt; 3:<text:line-break/> return {"status": "error", "message": "Maximale Bindungsordnung (3) erreicht."}<text:line-break/><text:line-break/># ==========================================<text:line-break/># 2. FREIE WOLKEN SUCHEN (Radikale zuerst!)<text:line-break/># ==========================================<text:line-break/>freie_A = sorted([w for w in atom_A["wolken"] if w["elektronen"] &lt; 3 and w["partner"] is None], key=lambda x: x["elektronen"])<text:line-break/>freie_B = sorted([w for w in atom_B["wolken"] if w["elektronen"] &lt; 3 and w["partner"] is None], key=lambda x: x["elektronen"])<text:line-break/><text:line-break/>if not freie_A or not freie_B:<text:line-break/> return {"status": "error", "message": "Keine freien Wolken für eine neue Bindung verfügbar."}<text:line-break/><text:line-break/># Die jeweils beste freie Wolke für die Bindung auswählen<text:line-break/>aktuelle_wolke_A = freie_A[0]<text:line-break/>aktuelle_wolke_B = freie_B[0]<text:line-break/><text:soft-page-break/><text:line-break/># ==========================================<text:line-break/># 3. DYNAMISCHE ABSTANDSBESTIMMUNG<text:line-break/># ==========================================<text:line-break/>sym_A, sym_B = atom_A["symbol"], atom_B["symbol"]<text:line-break/>try:<text:line-break/> # Versuch, den exakten Abstand aus einer vordefinierten Matrix zu lesen<text:line-break/> abstand = BINDUNGS_MATRIX[sym_A][sym_B][str(ziel_ordnung)]<text:line-break/>except (NameError, KeyError):<text:line-break/> # Fallback: Kovalente Radien addieren und je nach Bindungsordnung verkürzen (-5% pro Stufe)<text:line-break/> try:<text:line-break/> rad_A = ELEMENT_PROFIL[sym_A].get("radius", 1.0)<text:line-break/> rad_B = ELEMENT_PROFIL[sym_B].get("radius", 1.0)<text:line-break/> abstand = (rad_A + rad_B) * (1.0 - 0.05 * (ziel_ordnung - 1))<text:line-break/> except (NameError, KeyError):<text:line-break/> # Letzter Fallback, falls Profile unvollständig sind<text:line-break/> abstand = ELEMENT_PROFIL.get(sym_A, {}).get("abstand", 1.5)<text:line-break/><text:line-break/># ==========================================<text:line-break/># 4. GEOMETRISCHE ACHSE (Mittelwert-Berechnung)<text:line-break/># ==========================================<text:line-break/># Für Atom A: Alle bereits an B gebundenen Wolken + die neue Wolke<text:line-break/>beteiligte_wolken_A = bereits_gebunden_A + [aktuelle_wolke_A]<text:line-break/>lokaler_vektor_A = np.sum([np.array(w["lokal"]) for w in beteiligte_wolken_A], axis=0)<text:line-break/><text:line-break/>norm_A = np.linalg.norm(lokaler_vektor_A)<text:line-break/>if norm_A &lt; 1e-6: <text:s/># Schutz vor Division durch 0 (z.B. wenn Wolken exakt gegenüberliegen)<text:line-break/> <text:s text:c="3"/>achse_A = np.array([1.0, 0.0, 0.0])<text:line-break/>else:<text:line-break/> <text:s text:c="3"/>achse_A = lokaler_vektor_A / norm_A<text:line-break/><text:line-break/># Position von Atom B im Raum setzen<text:line-break/>neue_pos_B = np.array(atom_A["position"]) + (achse_A * abstand)<text:line-break/>atom_B["position"] = neue_pos_B.tolist()<text:line-break/><text:line-break/># ==========================================<text:line-break/># 5. CGA ROTOR-KASKADE (Ausrichtung &amp; Torsion)<text:line-break/># ==========================================<text:line-break/>ziel_achse_B = -achse_A <text:s/># Atom B muss genau entgegengesetzt schauen<text:line-break/><text:line-break/># Für Atom B: Alle bereits an A gebundenen Wolken + die neue Wolke<text:line-break/>beteiligte_wolken_B = bereits_gebunden_B + [aktuelle_wolke_B]<text:line-break/>start_vektor_B = np.sum([np.array(w["lokal"]) for w in beteiligte_wolken_B], axis=0)<text:line-break/><text:line-break/>norm_B = np.linalg.norm(start_vektor_B)<text:line-break/>if norm_B &lt; 1e-6:<text:line-break/> <text:s text:c="3"/>start_achse_B = np.array([1.0, 0.0, 0.0])<text:line-break/>else:<text:line-break/> <text:s text:c="3"/>start_achse_B = start_vektor_B / norm_B<text:line-break/><text:line-break/># Basis-Rotor berechnen (Ausrichtung der Achsen)<text:line-break/>R_final = berechne_richtungs_rotor(start_achse_B, ziel_achse_B)<text:line-break/><text:line-break/># Torsionswinkel je nach Bindungsordnung aufprägen (Verzahnung der restlichen Wolken)<text:line-break/>if ziel_ordnung == 2:<text:line-break/> <text:s text:c="3"/>R_torsion = berechne_axialen_rotor(achse_A, np.radians(0)) <text:s text:c="2"/># Eclipsed / Planar für Doppelbindung<text:line-break/> <text:s text:c="3"/>R_final = R_torsion * R_final<text:line-break/>elif ziel_ordnung == 3:<text:line-break/><text:soft-page-break/> <text:s text:c="3"/>R_torsion = berechne_axialen_rotor(achse_A, np.radians(60)) <text:s/># Versetzt für Dreifachbindung<text:line-break/> <text:s text:c="3"/>R_final = R_torsion * R_final<text:line-break/><text:line-break/># Multivektor-Komponenten für das Frontend/die Engine extrahieren (Annahme: Standard e12, e23, e31)<text:line-break/># Wenn du eine Library wie 'clifford' nutzt, ersetze das durch e12 = R_final[e1*e2] etc.<text:line-break/>atom_B["rotor_bivektor"] = [<text:line-break/> <text:s text:c="3"/>float(R_final[e1*e2]), <text:line-break/> <text:s text:c="3"/>float(R_final[e2*e3]), <text:line-break/> <text:s text:c="3"/>float(R_final[e3*e1])<text:line-break/>]<text:line-break/><text:line-break/># ==========================================<text:line-break/># 6. WELT-ZUSTAND AKTUALISIEREN<text:line-break/># ==========================================<text:line-break/>aktuelle_wolke_A["elektronen"] = 3 <text:s/># Status '3' steht für "gebundenes Paar"<text:line-break/>aktuelle_wolke_A["partner"] = daten["atom_B_id"]<text:line-break/><text:line-break/>aktuelle_wolke_B["elektronen"] = 3<text:line-break/>aktuelle_wolke_B["partner"] = daten["atom_A_id"]<text:line-break/><text:line-break/>return {<text:line-break/> <text:s text:c="3"/>"status": "success", <text:line-break/> <text:s text:c="3"/>"bindung_aktuell": ziel_ordnung,<text:line-break/> <text:s text:c="3"/>"abstand_genutzt": float(abstand)<text:line-break/>}</text:p>
      <text:p text:style-name="P19"/>
      <text:p text:style-name="P25">===============================================================================</text:p>
      <text:p text:style-name="P25">Finaler code:</text:p>
      <text:p text:style-name="P25"/>
      <text:p text:style-name="Preformatted_20_Text">@app.post("/binde") </text:p>
      <text:p text:style-name="Preformatted_20_Text">def binde(daten: dict): </text:p>
      <text:p text:style-name="Preformatted_20_Text"># ========================================== </text:p>
      <text:p text:style-name="Preformatted_20_Text"># 1. EXISTENZPRÜFUNG &amp; INITIALISIERUNG # ========================================== </text:p>
      <text:p text:style-name="Preformatted_20_Text">if daten["atom_A_id"] not in WELT_ZUSTAND or daten["atom_B_id"] not in WELT_ZUSTAND: return {"status": "error", "message": "Eines der Atome existiert nicht. ID prüfen!"}</text:p>
      <text:p text:style-name="Preformatted_20_Text"/>
      <text:p text:style-name="Preformatted_20_Text">atom_A = WELT_ZUSTAND[daten["atom_A_id"]]<text:line-break/>atom_B = WELT_ZUSTAND[daten["atom_B_id"]]<text:line-break/><text:line-break/>for w in atom_A["wolken"]:<text:line-break/> <text:s text:c="3"/>if "partner" not in w: w["partner"] = None<text:line-break/>for w in atom_B["wolken"]:<text:line-break/> <text:s text:c="3"/>if "partner" not in w: w["partner"] = None<text:line-break/><text:line-break/># Ermittle alle bereits zwischen DIESEN BEIDEN Atomen bestehenden Wolkenverbindungen<text:line-break/>bereits_gebunden_A = [w for w in atom_A["wolken"] if w["partner"] == daten["atom_B_id"]]<text:line-break/>bereits_gebunden_B = [w for w in atom_B["wolken"] if w["partner"] == daten["atom_A_id"]]<text:line-break/><text:line-break/>ziel_ordnung = len(bereits_gebunden_A) + 1<text:line-break/><text:soft-page-break/><text:line-break/>if ziel_ordnung &gt; 3:<text:line-break/> <text:s text:c="3"/>return {"status": "error", "message": "Maximale Bindungsordnung erreicht."}<text:line-break/><text:line-break/># ==========================================<text:line-break/># 2. FREIE WOLKEN SUCHEN (Filtert bereits besetzte aus!)<text:line-break/># ==========================================<text:line-break/>freie_A = sorted([w for w in atom_A["wolken"] if w["elektronen"] &lt; 3 and w["partner"] is None], key=lambda x: x["elektronen"])<text:line-break/>freie_B = sorted([w for w in atom_B["wolken"] if w["elektronen"] &lt; 3 and w["partner"] is None], key=lambda x: x["elektronen"])<text:line-break/><text:line-break/>if not freie_A or not freie_B:<text:line-break/> <text:s text:c="3"/>return {"status": "error", "message": "Keine freien Wolken verfügbar."}<text:line-break/><text:line-break/># Die aktuell zu bindenden Wolken sichern<text:line-break/>aktuelle_wolke_A = freie_A[0]<text:line-break/>aktuelle_wolke_B = freie_B[0]<text:line-break/><text:line-break/># ==========================================<text:line-break/># 3. ABSTANDSBESTIMMUNG (Deine originale Logik)<text:line-break/># ==========================================<text:line-break/>if "O" in [atom_A["symbol"], atom_B["symbol"]]:<text:line-break/> <text:s text:c="3"/>abstand = ELEMENT_PROFIL["O"]["abstand"]<text:line-break/>else:<text:line-break/> <text:s text:c="3"/>abstand = ELEMENT_PROFIL["H"]["abstand"] if (atom_A["symbol"] == "H" or atom_B["symbol"] == "H") else ELEMENT_PROFIL["C"]["abstand"]<text:line-break/><text:line-break/># ==========================================<text:line-break/># 4. GEOMETRISCHE ACHSE (Mittelwert aller beteiligten Wolken)<text:line-break/># ==========================================<text:line-break/># Nimm alle Altwendungen + die neue Wolke für Atom A<text:line-break/>beteiligte_wolken_A = bereits_gebunden_A + [aktuelle_wolke_A]<text:line-break/>lokaler_vektor_A = np.sum([np.array(w["lokal"]) for w in beteiligte_wolken_A], axis=0)<text:line-break/><text:line-break/>if np.linalg.norm(lokaler_vektor_A) == 0:<text:line-break/> <text:s text:c="3"/>achse_A = np.array([1.0, 0.0, 0.0])<text:line-break/>else:<text:line-break/> <text:s text:c="3"/>achse_A = lokaler_vektor_A / np.linalg.norm(lokaler_vektor_A)<text:line-break/><text:line-break/>neue_pos_B = np.array(atom_A["position"]) + (achse_A * abstand)<text:line-break/>atom_B["position"] = neue_pos_B.tolist()<text:line-break/><text:line-break/># ==========================================<text:line-break/># 5. CGA ROTOR-KASKADE (Mittelwert für Atom B)<text:line-break/># ==========================================<text:line-break/>ziel_achse_B = -achse_A<text:line-break/><text:line-break/># Nimm alle Altverbindungen + die neue Wolke für Atom B<text:line-break/>beteiligte_wolken_B = bereits_gebunden_B + [aktuelle_wolke_B]<text:line-break/>start_vektor_B = np.sum([np.array(w["lokal"]) for w in beteiligte_wolken_B], axis=0)<text:line-break/><text:line-break/>if np.linalg.norm(start_vektor_B) == 0:<text:line-break/> <text:s text:c="3"/>start_achse_B = np.array([1.0, 0.0, 0.0])<text:line-break/>else:<text:line-break/> <text:s text:c="3"/>start_achse_B = start_vektor_B / np.linalg.norm(start_vektor_B)<text:line-break/><text:line-break/>R_final = berechne_richtungs_rotor(start_achse_B, ziel_achse_B)<text:line-break/><text:line-break/>if ziel_ordnung == 2:<text:line-break/> <text:s text:c="3"/>R_torsion = berechne_axialen_rotor(achse_A, np.radians(0))<text:line-break/> <text:s text:c="3"/>R_final = R_torsion * R_final<text:line-break/><text:soft-page-break/>elif ziel_ordnung == 3:<text:line-break/> <text:s text:c="3"/>R_torsion = berechne_axialen_rotor(achse_A, np.radians(60))<text:line-break/> <text:s text:c="3"/>R_final = R_torsion * R_final<text:line-break/><text:line-break/>atom_B["rotor_bivektor"] = [float(R_final[e1*e2]), float(R_final[e2*e3]), float(R_final[e3*e1])]<text:line-break/><text:line-break/># ==========================================<text:line-break/># 6. STATUS UPDATEN (Exakt auf den gewählten Wolken)<text:line-break/># ==========================================<text:line-break/>aktuelle_wolke_A["elektronen"] = 3<text:line-break/>aktuelle_wolke_A["partner"] = daten["atom_B_id"]<text:line-break/><text:line-break/>aktuelle_wolke_B["elektronen"] = 3<text:line-break/>aktuelle_wolke_B["partner"] = daten["atom_A_id"]<text:line-break/><text:line-break/>return {"status": "success", "bindung_aktuell": ziel_ordnung}</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1T12:41:05.650220000</meta:creation-date>
    <meta:editing-duration>PT5M5S</meta:editing-duration>
    <meta:editing-cycles>2</meta:editing-cycles>
    <meta:generator>LibreOffice/26.2.0.3$MacOSX_X86_64 LibreOffice_project/afbbd0df0edb6d40b450b0337ac646b0913a760c</meta:generator>
    <dc:date>2026-07-01T12:46:07.819785000</dc:date>
    <meta:document-statistic meta:table-count="1" meta:image-count="0" meta:object-count="0" meta:page-count="10" meta:paragraph-count="156" meta:word-count="2146" meta:character-count="18039" meta:non-whitespace-character-count="15833"/>
  </office:meta>
</office:document-meta>
</file>